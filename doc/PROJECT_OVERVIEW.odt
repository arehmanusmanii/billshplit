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000000022F9113789A.png" manifest:media-type="image/png"/>
  <manifest:file-entry manifest:full-path="Pictures/1000000100000B00000006005851188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paragraph-rsid="001da06a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Heading_20_2">
      <style:text-properties officeooo:rsid="001da06a" officeooo:paragraph-rsid="001da06a"/>
    </style:style>
    <style:style style:name="P8" style:family="paragraph" style:parent-style-name="Text_20_body">
      <style:text-properties officeooo:rsid="001da06a" officeooo:paragraph-rsid="001da06a"/>
    </style:style>
    <style:style style:name="P9" style:family="paragraph" style:parent-style-name="Text_20_body">
      <style:text-properties officeooo:paragraph-rsid="001da06a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BillShplit - Project Overview</text:h>
      <text:h text:style-name="Heading_20_2" text:outline-level="2">What is BillShplit?</text:h>
      <text:p text:style-name="Text_20_body">BillShplit is a modern, transparent bill-splitting application designed with a competitive "gaming" aesthetic. Inspired by platforms like League of Legends and U.GG, it treats every shared meal as a "Match" and maintains a public "Match History" for all users. The goal is to make debt management transparent, social, and easy through automated parsing and a "Web of Trust" model.</text:p>
      <text:p text:style-name="Text_20_body"/>
      <text:p text:style-name="Text_20_body"/>
      <text:p text:style-name="Text_20_body"><draw:frame draw:style-name="fr1" draw:name="Image2" text:anchor-type="char" svg:width="7.3016in" svg:height="3.9827in" draw:z-index="0"><draw:image xlink:href="Pictures/1000000100000B00000006005851188C.png" xlink:type="simple" xlink:show="embed" xlink:actuate="onLoad" draw:mime-type="image/png"/></draw:frame></text:p>
      <text:h text:style-name="P1" text:outline-level="2"/>
      <text:h text:style-name="P1" text:outline-level="2">Core Concepts</text:h>
      <text:h text:style-name="Heading_20_3" text:outline-level="3">1. The "Match History" Vibe</text:h>
      <text:list text:style-name="L1">
        <text:list-item>
          <text:p text:style-name="P2">Every meal or shared expense is recorded as a <text:span text:style-name="T1">Match</text:span>.</text:p>
        </text:list-item>
        <text:list-item>
          <text:p text:style-name="P2">User profiles are public and transparent, showing their <text:span text:style-name="T1">Net Balance</text:span> (Total Owed vs. Total Owed to Others).</text:p>
        </text:list-item>
        <text:list-item>
          <text:p text:style-name="P2">Recency suggestions help you quickly add friends you've recently "played" (eaten) with.</text:p>
        </text:list-item>
      </text:list>
      <text:h text:style-name="Heading_20_3" text:outline-level="3" text:is-list-header="true"><text:soft-page-break/>2. The Web of Trust</text:h>
      <text:list text:style-name="L2">
        <text:list-item>
          <text:p text:style-name="P3">To ensure accuracy and prevent disputes, only the <text:span text:style-name="T1">Creditor</text:span> (the person who is owed money) has the authority to mark a debt as settled.</text:p>
        </text:list-item>
        <text:list-item>
          <text:p text:style-name="P3">This creates a reliable ledger where your balance truly reflects your social financial standing.</text:p>
        </text:list-item>
      </text:list>
      <text:h text:style-name="Heading_20_3" text:outline-level="3" text:is-list-header="true">3. Smart Receipt Parsing (AI Vision)</text:h>
      <text:list text:style-name="L3">
        <text:list-item>
          <text:p text:style-name="P4">BillShplit uses AI Vision (Meta Llama Scout) to scan receipts.</text:p>
        </text:list-item>
        <text:list-item>
          <text:p text:style-name="P4">It automatically identifies individual items, prices, and quantities.</text:p>
        </text:list-item>
        <text:list-item>
          <text:p text:style-name="P4">Users can "claim" their items from the parsed list, while shared items (like appetizers) and taxes are split according to customizable logic.</text:p>
        </text:list-item>
      </text:list>
      <text:h text:style-name="Heading_20_2" text:outline-level="2" text:is-list-header="true">Key Functions &amp; Features</text:h>
      <text:list text:style-name="L4">
        <text:list-item>
          <text:p text:style-name="P5"><text:span text:style-name="T1">Lobby System:</text:span> Create a "Party" for a meal, invite friends, and set a Leader.</text:p>
        </text:list-item>
        <text:list-item>
          <text:p text:style-name="P5"><text:span text:style-name="T1">Global Restaurant Registry:</text:span> A verified database of restaurants and menu items to speed up expense entry.</text:p>
        </text:list-item>
        <text:list-item>
          <text:p text:style-name="P5"><text:span text:style-name="T1">Auto-Split Logic:</text:span> Intelligent calculation of taxes and shared costs.</text:p>
        </text:list-item>
        <text:list-item>
          <text:p text:style-name="P5"><text:span text:style-name="T1">Debt Trigger System:</text:span> Automatically converts "covered" shares into tracked IOUs in the debt system.</text:p>
        </text:list-item>
        <text:list-item>
          <text:p text:style-name="P5"><text:span text:style-name="T1">Transparency Dashboard:</text:span> A public profile showing your "stats"—total paid all-time, current balance, and match history.</text:p>
        </text:list-item>
      </text:list>
      <text:h text:style-name="Heading_20_2" text:outline-level="2" text:is-list-header="true">Technical Stack</text:h>
      <text:list text:style-name="L5">
        <text:list-item>
          <text:p text:style-name="P6"><text:span text:style-name="T1">Frontend:</text:span> Next.js 14 (App Router), Tailwind CSS</text:p>
        </text:list-item>
        <text:list-item>
          <text:p text:style-name="P6"><text:span text:style-name="T1">Backend:</text:span> Supabase (Auth, PostgreSQL, Storage)</text:p>
        </text:list-item>
        <text:list-item>
          <text:p text:style-name="P6"><text:span text:style-name="T1">AI:</text:span> Meta Llama Scout for OCR</text:p>
        </text:list-item>
        <text:list-item>
          <text:p text:style-name="P6"><text:span text:style-name="T1">State Management:</text:span> TypeScript-first architecture</text:p>
        </text:list-item>
      </text:list>
      <text:p text:style-name="Text_20_body"/>
      <text:h text:style-name="P7" text:outline-level="2" text:is-list-header="true">Illustrated Workflow</text:h>
      <text:p text:style-name="P8">Not completely accurate*</text:p>
      <text:p text:style-name="P9"><draw:frame draw:style-name="fr2" draw:name="Image1" text:anchor-type="char" svg:width="6.9252in" svg:height="3.7799in" draw:z-index="1"><draw:image xlink:href="Pictures/10000001000004000000022F9113789A.png" xlink:type="simple" xlink:show="embed" xlink:actuate="onLoad" draw:mime-type="image/png"/></draw:frame><text:soft-page-break/></text:p>
      <text:p text:style-name="Horizontal_20_Line"/>
      <text:p text:style-name="Text_20_body"><text:span text:style-name="T2"/>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Sans NF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Sans N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Sans NF1" style:font-family-complex="'NotoSans NF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Sans NF" style:font-family-complex="'NotoSans NF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Sans NF" style:font-family-complex="'NotoSans NF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Sans NF" style:font-family-complex="'NotoSans NF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5-17T23:52:26.454012631</dc:date>
    <meta:editing-duration>PT2M28S</meta:editing-duration>
    <meta:editing-cycles>2</meta:editing-cycles>
    <meta:generator>LibreOffice/26.2.3.2$Linux_X86_64 LibreOffice_project/ca14918b0fa569b9db704e10d20c5d2a5a16ac6d</meta:generator>
    <meta:document-statistic meta:table-count="0" meta:image-count="2" meta:object-count="0" meta:page-count="3" meta:paragraph-count="28" meta:word-count="320" meta:character-count="2001" meta:non-whitespace-character-count="1727"/>
  </office:meta>
</office:document-meta>
</file>